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438DCFE95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Aileron" svg:font-family="Aileron"/>
    <style:font-face style:name="Aileron Bold" svg:font-family="'Aileron Bold'"/>
    <style:font-face style:name="Aileron Ultra-Bold" svg:font-family="'Aileron Ultra-Bold'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71cm" fo:padding-bottom="0.071cm" fo:padding-left="0.071cm" fo:padding-right="0.071cm" fo:wrap-option="wrap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01cm, 7.955cm, 15.343cm, 7.645cm)" draw:image-opacity="100%" style:mirror="none" loext:decorative="false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965cm, 7.678cm, 0.671cm, 7.674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.018cm" draw:stroke-linejoin="miter" svg:stroke-linecap="butt" draw:fill="solid" draw:fill-color="#042882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18cm" draw:stroke-linejoin="miter" svg:stroke-linecap="butt" draw:fill="solid" draw:fill-color="#2a83d0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.018cm" draw:stroke-linejoin="miter" svg:stroke-linecap="butt" draw:fill="solid" draw:fill-color="#042882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.018cm" draw:stroke-linejoin="miter" svg:stroke-linecap="butt" draw:fill="solid" draw:fill-color="#2a83d0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.018cm" draw:stroke-linejoin="miter" svg:stroke-linecap="butt" draw:fill="solid" draw:fill-color="#042882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34" style:family="graphic" style:parent-style-name="standard">
      <style:graphic-properties draw:stroke="none" svg:stroke-width="0.018cm" draw:stroke-linejoin="miter" svg:stroke-linecap="butt" draw:fill="solid" draw:fill-color="#9999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le_20_and_20_bod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gradient" draw:fill-gradient-name="Gradient_20_1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IN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0.469cm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.55cm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.55cm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0.685cm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0.685cm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0.457cm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0.457cm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0.719cm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0.719cm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.282cm" fo:line-height="150%" fo:text-align="start" fo:text-indent="0cm" style:punctuation-wrap="hanging" loext:tab-stop-distance="1.27cm" style:writing-mode="lr-tb">
        <style:tab-stops>
          <style:tab-stop style:position="11.748cm" style:type="center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82cm" fo:line-height="150%" fo:text-align="start" fo:text-indent="0cm" style:punctuation-wrap="hanging" loext:tab-stop-distance="1.27cm" style:font-independent-line-spacing="true">
        <style:tab-stops>
          <style:tab-stop style:position="11.748cm" style:type="center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9" style:family="paragraph">
      <loext:graphic-properties draw:fill="solid" draw:fill-color="#042882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solid" draw:fill-color="#2a83d0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solid" draw:fill-color="#99999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style:paragraph-properties fo:margin-left="0cm" fo:margin-right="0cm" fo:margin-top="0cm" fo:margin-bottom="0cm" fo:line-height="3.71cm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3.71cm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IN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d358d" loext:opacity="100%" style:text-outline="false" style:text-line-through-style="none" style:text-line-through-type="none" style:text-position="0% 100%" style:font-name="Calibri Light" fo:font-size="36.5999984741211pt" fo:letter-spacing="normal" fo:language="en" fo:country="US" fo:font-style="normal" style:text-underline-style="none" fo:font-weight="bold" fo:background-color="transparent" style:font-name-asian="Aileron Ultra-Bold" style:font-size-asian="36.5999984741211pt" style:font-style-asian="normal" style:font-weight-asian="bold" style:font-name-complex="Aileron Ultra-Bold" style:font-size-complex="36.5999984741211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16.2000007629395pt" fo:letter-spacing="0.206cm" fo:language="en" fo:country="US" fo:font-style="normal" style:text-underline-style="none" fo:font-weight="bold" fo:background-color="transparent" style:font-name-asian="Aileron Bold" style:font-size-asian="16.2000007629395pt" style:font-style-asian="normal" style:font-weight-asian="bold" style:font-name-complex="Aileron Bold" style:font-size-complex="16.2000007629395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0pt" fo:letter-spacing="normal" fo:language="en" fo:country="US" fo:font-style="normal" style:text-underline-style="none" fo:font-weight="normal" fo:background-color="transparent" style:font-name-asian="Aileron" style:font-size-asian="10pt" style:font-style-asian="normal" style:font-weight-asian="normal" style:font-name-complex="Aileron" style:font-size-complex="1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d358d" loext:opacity="100%" style:text-outline="false" style:text-line-through-style="none" style:text-line-through-type="none" style:text-position="0% 100%" style:font-name="Calibri Light" fo:font-size="18pt" fo:letter-spacing="normal" fo:language="en" fo:country="US" fo:font-style="normal" style:text-underline-style="none" fo:font-weight="bold" fo:background-color="transparent" style:font-name-asian="Aileron Bold" style:font-size-asian="18pt" style:font-style-asian="normal" style:font-weight-asian="bold" style:font-name-complex="Aileron 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en" fo:country="IN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Times New Roman2" style:font-size-asian="24pt" style:font-style-asian="normal" style:font-weight-asian="normal" style:font-name-complex="Times New Roman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Calibri" style:font-size-asian="24pt" style:font-style-asian="normal" style:font-weight-asian="normal" style:font-name-complex="Times New Roman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IN" fo:font-style="normal" style:text-underline-style="none" fo:font-weight="normal" fo:background-color="transparent" style:font-name-asian="Calibri" style:font-size-asian="24pt" style:font-style-asian="normal" style:font-weight-asian="normal" style:font-name-complex="Times New Roman" style:font-size-complex="24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Times New Roman2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name-asian="Times New Roman2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d358d" loext:opacity="100%" style:text-outline="false" style:text-line-through-style="none" style:text-line-through-type="none" style:text-position="0% 100%" style:font-name="Arial1" fo:font-size="49.2000007629395pt" fo:letter-spacing="normal" fo:language="en" fo:country="US" fo:font-style="normal" style:text-underline-style="none" fo:font-weight="bold" fo:background-color="transparent" style:font-name-asian="Aileron Ultra-Bold" style:font-size-asian="49.2000007629395pt" style:font-style-asian="normal" style:font-weight-asian="bold" style:font-name-complex="Arial1" style:font-size-complex="49.2000007629395pt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IN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d35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g draw:name="Group 2" draw:style-name="gr1">
          <draw:custom-shape draw:name="Freeform 3" draw:style-name="gr2" draw:text-style-name="P2" draw:layer="layout" svg:width="11.536cm" svg:height="0.349cm" svg:x="0cm" svg:y="0cm">
            <text:p text:style-name="P1"><text:span text:style-name="T1"/></text:p>
            <draw:enhanced-geometry draw:mirror-horizontal="false" draw:mirror-vertical="false" drawooo:sub-view-size="2187782 66464" draw:text-areas="0 0 ?f0 ?f1" svg:viewBox="0 0 0 0" draw:type="ooxml-non-primitive" draw:enhanced-path="M 0 0 L 2187782 0 2187782 66464 0 66464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4" draw:layer="layout" svg:width="11.536cm" svg:height="0.55cm" svg:x="0cm" svg:y="-0.201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1">
          <draw:custom-shape draw:name="Freeform 6" draw:style-name="gr2" draw:text-style-name="P2" draw:layer="layout" svg:width="21.03cm" svg:height="0.349cm" svg:x="0cm" svg:y="15.596cm">
            <text:p text:style-name="P1"><text:span text:style-name="T1"/></text:p>
            <draw:enhanced-geometry draw:mirror-horizontal="false" draw:mirror-vertical="false" drawooo:sub-view-size="3988171 66464" draw:text-areas="0 0 ?f0 ?f1" svg:viewBox="0 0 0 0" draw:type="ooxml-non-primitive" draw:enhanced-path="M 0 0 L 3988171 0 3988171 66464 0 66464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4" draw:layer="layout" svg:width="21.03cm" svg:height="0.55cm" svg:x="0cm" svg:y="15.395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 draw:style-name="gr1">
          <draw:custom-shape draw:name="Freeform 29" draw:style-name="gr2" draw:text-style-name="P2" draw:layer="layout" svg:width="12.084cm" svg:height="1.518cm" svg:x="0cm" svg:y="8.397cm">
            <text:p text:style-name="P1"><text:span text:style-name="T1"/></text:p>
            <draw:enhanced-geometry draw:mirror-horizontal="false" draw:mirror-vertical="false" drawooo:sub-view-size="4355842 406400" draw:text-areas="0 0 ?f0 ?f1" svg:viewBox="0 0 0 0" draw:type="ooxml-non-primitive" draw:enhanced-path="M 4152642 0 L 0 0 0 406400 4152642 406400 4355842 203200 4152642 0 Z N">
              <draw:equation draw:name="f0" draw:formula="logwidth"/>
              <draw:equation draw:name="f1" draw:formula="logheight"/>
            </draw:enhanced-geometry>
          </draw:custom-shape>
          <draw:custom-shape draw:name="TextBox 30" draw:style-name="gr3" draw:text-style-name="P4" draw:layer="layout" svg:width="11.767cm" svg:height="1.661cm" svg:x="0cm" svg:y="8.254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4" draw:text-style-name="P6" draw:layer="layout" svg:width="11.124cm" svg:height="1.519cm" svg:x="1.296cm" svg:y="4.562cm">
          <text:p text:style-name="P5"><text:span text:style-name="T3">Blogy – A Modern Blog Web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" draw:text-style-name="P8" draw:layer="layout" svg:width="10.581cm" svg:height="0.676cm" svg:x="1.296cm" svg:y="8.613cm">
          <text:p text:style-name="P7"><text:span text:style-name="T4">PRESENTATION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 draw:style-name="gr1">
          <draw:custom-shape draw:name="TextBox 40" draw:style-name="gr6" draw:text-style-name="P10" draw:layer="layout" svg:width="5.467cm" svg:height="0.456cm" svg:x="2.023cm" svg:y="11.898cm">
            <text:p text:style-name="P9"><text:span text:style-name="T5">Student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7" draw:text-style-name="P12" draw:layer="layout" svg:width="5.467cm" svg:height="0.72cm" svg:x="2.023cm" svg:y="12.347cm">
            <text:p text:style-name="P11"><text:span text:style-name="T6">Priyanshu Banoudha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1" draw:style-name="gr8" draw:text-style-name="P13" draw:layer="layout" svg:width="1.322cm" svg:height="1.06cm" svg:x="0.6cm" svg:y="11.967cm">
            <draw:image xlink:href="Pictures/100000010000043800000438DCFE9564.png" xlink:type="simple" xlink:show="embed" xlink:actuate="onLoad" draw:mime-type="image/png">
              <text:p/>
            </draw:image>
            <svg:desc>A blue circle with a person and a envelope in it

AI-generated content may be incorrect.</svg:desc>
          </draw:frame>
        </draw:g>
        <draw:g draw:name="Group 62" draw:style-name="gr1">
          <draw:custom-shape draw:name="TextBox 41" draw:style-name="gr9" draw:text-style-name="P10" draw:layer="layout" svg:width="6.006cm" svg:height="0.456cm" svg:x="9.208cm" svg:y="11.908cm">
            <text:p text:style-name="P9"><text:span text:style-name="T5">Student Ema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10" draw:text-style-name="P12" draw:layer="layout" svg:width="7.543cm" svg:height="0.72cm" svg:x="9.208cm" svg:y="12.357cm">
            <text:p text:style-name="P11"><text:span text:style-name="T6">priyanshubanoudha8@.co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5" draw:style-name="gr11" draw:text-style-name="P13" draw:layer="layout" svg:width="1.32cm" svg:height="1.082cm" svg:x="7.785cm" svg:y="11.942cm">
            <draw:image xlink:href="Pictures/100000010000043800000438DCFE9564.png" xlink:type="simple" xlink:show="embed" xlink:actuate="onLoad" draw:mime-type="image/png">
              <text:p/>
            </draw:image>
            <svg:desc>A blue circle with a person and a envelope in it

AI-generated content may be incorrect.</svg:desc>
          </draw:frame>
        </draw:g>
        <draw:g draw:name="Group 66" draw:style-name="gr1">
          <draw:custom-shape draw:name="TextBox 41" draw:style-name="gr12" draw:text-style-name="P10" draw:layer="layout" svg:width="5.027cm" svg:height="0.44cm" svg:x="16.905cm" svg:y="11.967cm">
            <text:p text:style-name="P9"><text:span text:style-name="T5">Gui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13" draw:text-style-name="P12" draw:layer="layout" svg:width="6.313cm" svg:height="0.72cm" svg:x="16.905cm" svg:y="12.416cm">
            <text:p text:style-name="P11"><text:span text:style-name="T6">Abhishek Mishr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g draw:name="Group 28" draw:style-name="gr1">
          <draw:custom-shape draw:name="Freeform 29" draw:style-name="gr15" draw:text-style-name="P15" draw:layer="layout" svg:width="24.998cm" svg:height="1.518cm" svg:x="0cm" svg:y="0.36cm">
            <text:p text:style-name="P1"><text:span text:style-name="T7">OUTL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16" draw:text-style-name="P17" draw:layer="layout" svg:width="12.49cm" svg:height="10.729cm" svg:x="1.279cm" svg:y="2.575cm">
          <text:list text:style-name="L5">
            <text:list-item>
              <text:p text:style-name="P16"><text:span text:style-name="T8">Abstract of the Project</text:span></text:p>
            </text:list-item>
            <text:list-item>
              <text:p text:style-name="P16"><text:span text:style-name="T9">Problem Statement</text:span></text:p>
            </text:list-item>
            <text:list-item>
              <text:p text:style-name="P16"><text:span text:style-name="T9">Proposed Solution</text:span></text:p>
            </text:list-item>
            <text:list-item>
              <text:p text:style-name="P16"><text:span text:style-name="T9">System Architecture</text:span></text:p>
            </text:list-item>
            <text:list-item>
              <text:p text:style-name="P16"><text:span text:style-name="T9">Live Demo of the Project</text:span></text:p>
            </text:list-item>
            <text:list-item>
              <text:p text:style-name="P16"><text:span text:style-name="T10">Conclusion &amp;</text:span><text:span text:style-name="T9">Future Sco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g draw:name="Group 28" draw:style-name="gr1">
          <draw:custom-shape draw:name="Freeform 29" draw:style-name="gr17" draw:text-style-name="P15" draw:layer="layout" svg:width="24.998cm" svg:height="1.518cm" svg:x="0cm" svg:y="0.36cm">
            <text:p text:style-name="P1"><text:span text:style-name="T7">ABSTRA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18" draw:text-style-name="P17" draw:layer="layout" svg:width="22.499cm" svg:height="8.61cm" svg:x="1.279cm" svg:y="2.575cm">
          <text:list text:style-name="L5">
            <text:list-item>
              <text:p text:style-name="P16"><text:span text:style-name="T11">Blogy is a responsive single-page blog web application built with React 19 and Vite</text:span></text:p>
            </text:list-item>
            <text:list-item>
              <text:p text:style-name="P16"><text:span text:style-name="T11">Visitors can browse, search, and read blog posts with images, tags, and author details</text:span></text:p>
            </text:list-item>
            <text:list-item>
              <text:p text:style-name="P16"><text:span text:style-name="T11">Includes category-based filtering, a live comment system, and a working contact form</text:span></text:p>
            </text:list-item>
            <text:list-item>
              <text:p text:style-name="P16"><text:span text:style-name="T11">Uses Axios to consume a REST API (JSONPlaceholder) as its data layer</text:span></text:p>
            </text:list-item>
            <text:list-item>
              <text:p text:style-name="P16"><text:span text:style-name="T11">Styled entirely with Bootstrap 5 for a clean, mobile-friendly interf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7.402cm" svg:height="11.136cm" svg:x="1.798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g draw:name="Group 28" draw:style-name="gr1">
          <draw:custom-shape draw:name="Freeform 29" draw:style-name="gr19" draw:text-style-name="P15" draw:layer="layout" svg:width="24.998cm" svg:height="1.518cm" svg:x="0cm" svg:y="0.36cm">
            <text:p text:style-name="P1"><text:span text:style-name="T12">PROBLEM STATEMENT</text:span></text:p>
            <text:p text:style-name="P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20" draw:text-style-name="P17" draw:layer="layout" svg:width="22.499cm" svg:height="6.888cm" svg:x="1.279cm" svg:y="2.575cm">
          <text:list text:style-name="L5">
            <text:list-item>
              <text:p text:style-name="P16"><text:span text:style-name="T11">Full CMS platforms like WordPress are heavy and need complex backend setup</text:span></text:p>
            </text:list-item>
            <text:list-item>
              <text:p text:style-name="P16"><text:span text:style-name="T11">Students need a lightweight way to practice real front-end architecture: routing, state, and API calls</text:span></text:p>
            </text:list-item>
            <text:list-item>
              <text:p text:style-name="P16"><text:span text:style-name="T11">Many student blog projects are static and lack real interactivity (comments, search, categories)</text:span></text:p>
            </text:list-item>
            <text:list-item>
              <text:p text:style-name="P16"><text:span text:style-name="T11">There is a need for a fast, responsive blog UI that works without maintaining a custom backend or datab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7.402cm" svg:height="11.136cm" svg:x="1.798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g draw:name="Group 28" draw:style-name="gr1">
          <draw:custom-shape draw:name="Freeform 29" draw:style-name="gr21" draw:text-style-name="P15" draw:layer="layout" svg:width="24.998cm" svg:height="1.518cm" svg:x="0cm" svg:y="0.36cm">
            <text:p text:style-name="P1"><text:span text:style-name="T12">PROPOSED SOLUTION</text:span></text:p>
            <text:p text:style-name="P1"><text:span text:style-name="T12"/></text:p>
            <text:p text:style-name="P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22" draw:text-style-name="P17" draw:layer="layout" svg:width="22.499cm" svg:height="8.61cm" svg:x="1.279cm" svg:y="2.575cm">
          <text:list text:style-name="L5">
            <text:list-item>
              <text:p text:style-name="P16"><text:span text:style-name="T11">Build a React single-page application using functional components and hooks</text:span></text:p>
            </text:list-item>
            <text:list-item>
              <text:p text:style-name="P16"><text:span text:style-name="T11">Use React Router v7 for client-side navigation across Home, Post, Category, and Contact pages</text:span></text:p>
            </text:list-item>
            <text:list-item>
              <text:p text:style-name="P16"><text:span text:style-name="T11">Fetch posts, users, comments, and albums from JSONPlaceholder via a dedicated Axios service layer</text:span></text:p>
            </text:list-item>
            <text:list-item>
              <text:p text:style-name="P16"><text:span text:style-name="T11">Provide search, category filtering, pagination, and a live comment form for interactivity</text:span></text:p>
            </text:list-item>
            <text:list-item>
              <text:p text:style-name="P16"><text:span text:style-name="T11">Style entirely with Bootstrap 5 components for a responsive, mobile-first layo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7.402cm" svg:height="11.136cm" svg:x="1.798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g draw:name="Group 28" draw:style-name="gr1">
          <draw:custom-shape draw:name="Freeform 29" draw:style-name="gr23" draw:text-style-name="P15" draw:layer="layout" svg:width="24.998cm" svg:height="1.518cm" svg:x="0cm" svg:y="0.36cm">
            <text:p text:style-name="P1"><text:span text:style-name="T12">Live Demo</text:span></text:p>
            <text:p text:style-name="P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24" draw:text-style-name="P17" draw:layer="layout" svg:width="22.499cm" svg:height="8.61cm" svg:x="1.279cm" svg:y="2.575cm">
          <text:list text:style-name="L5">
            <text:list-item>
              <text:p text:style-name="P16"><text:span text:style-name="T11">Live site: blog2-kohl-psi.vercel.app</text:span></text:p>
            </text:list-item>
            <text:list-item>
              <text:p text:style-name="P16"><text:span text:style-name="T11">Home page: hero banner, featured posts, and paginated latest posts</text:span></text:p>
            </text:list-item>
            <text:list-item>
              <text:p text:style-name="P16"><text:span text:style-name="T11">Blog Post page: full article, author info, tags, related posts, and comments</text:span></text:p>
            </text:list-item>
            <text:list-item>
              <text:p text:style-name="P16"><text:span text:style-name="T11">Category page: posts filtered by author/category</text:span></text:p>
            </text:list-item>
            <text:list-item>
              <text:p text:style-name="P16"><text:span text:style-name="T11">Contact page: working message form with client-side valid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7.402cm" svg:height="11.136cm" svg:x="1.798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g draw:name="Group 28" draw:style-name="gr1">
          <draw:custom-shape draw:name="Freeform 29" draw:style-name="gr25" draw:text-style-name="P15" draw:layer="layout" svg:width="24.998cm" svg:height="1.518cm" svg:x="0cm" svg:y="0.36cm">
            <text:p text:style-name="P1"><text:span text:style-name="T12">CONCLUSION &amp; FUTURE SCOPE</text:span></text:p>
            <text:p text:style-name="P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26" draw:text-style-name="P17" draw:layer="layout" svg:width="22.499cm" svg:height="8.61cm" svg:x="1.279cm" svg:y="2.575cm">
          <text:list text:style-name="L5">
            <text:list-item>
              <text:p text:style-name="P16"><text:span text:style-name="T11">Built a fully responsive blog front-end using React, React Router, and Bootstrap 5</text:span></text:p>
            </text:list-item>
            <text:list-item>
              <text:p text:style-name="P16"><text:span text:style-name="T11">Demonstrated component-based architecture, REST API integration, and client-side routing</text:span></text:p>
            </text:list-item>
            <text:list-item>
              <text:p text:style-name="P16"><text:span text:style-name="T11">Future: connect a real backend (Node.js + Express + MongoDB) for persistent posts and comments</text:span></text:p>
            </text:list-item>
            <text:list-item>
              <text:p text:style-name="P16"><text:span text:style-name="T11">Future: add user authentication, a rich-text post editor, and dark mode</text:span></text:p>
            </text:list-item>
            <text:list-item>
              <text:p text:style-name="P16"><text:span text:style-name="T11">Future: improve SEO with server-side rendering and set up a CI/CD deployment pipel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7.402cm" svg:height="11.136cm" svg:x="1.798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g draw:name="Group 28" draw:style-name="gr1">
          <draw:custom-shape draw:name="Freeform 29" draw:style-name="gr27" draw:text-style-name="P15" draw:layer="layout" svg:width="24.998cm" svg:height="1.518cm" svg:x="0cm" svg:y="0.36cm">
            <text:p text:style-name="P1"><text:span text:style-name="T12">SYSTEM ARCHITECTURE</text:span></text:p>
            <text:p text:style-name="P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3" draw:text-style-name="P4" draw:layer="layout" svg:width="24.342cm" svg:height="1.661cm" svg:x="0cm" svg:y="0.217cm">
            <text:p text:style-name="P3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28" draw:text-style-name="P17" draw:layer="layout" svg:width="23.055cm" svg:height="5.971cm" svg:x="1.279cm" svg:y="2.278cm">
          <text:list text:style-name="L5">
            <text:list-item>
              <text:p text:style-name="P16"><text:span text:style-name="T13">Presentation: React components (Navbar, Hero, BlogCard, Sidebar)</text:span></text:p>
            </text:list-item>
            <text:list-item>
              <text:p text:style-name="P16"><text:span text:style-name="T13">Routing: React Router v7 maps URLs to each page</text:span></text:p>
            </text:list-item>
            <text:list-item>
              <text:p text:style-name="P16"><text:span text:style-name="T13">Service Layer: Axios module wraps all HTTP calls</text:span></text:p>
            </text:list-item>
            <text:list-item>
              <text:p text:style-name="P16"><text:span text:style-name="T13">Data Source: JSONPlaceholder REST API</text:span></text:p>
            </text:list-item>
            <text:list-item>
              <text:p text:style-name="P16"><text:span text:style-name="T13">Deployment: Vite build hosted on Verc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29" draw:text-style-name="P19" draw:layer="layout" svg:width="3.943cm" svg:height="2.638cm" svg:x="2.138cm" svg:y="9.583cm">
          <text:p text:style-name="P18"><text:span text:style-name="T14">React UI</text:span></text:p>
          <text:p text:style-name="P18"><text:span text:style-name="T14">Compon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0" draw:style-name="gr30" draw:text-style-name="P20" draw:layer="layout" svg:width="3.943cm" svg:height="2.638cm" svg:x="6.333cm" svg:y="9.583cm">
          <text:p text:style-name="P18"><text:span text:style-name="T14">React Router</text:span></text:p>
          <text:p text:style-name="P18"><text:span text:style-name="T14">(Routing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1" draw:style-name="gr31" draw:text-style-name="P19" draw:layer="layout" svg:width="3.943cm" svg:height="2.638cm" svg:x="10.527cm" svg:y="9.583cm">
          <text:p text:style-name="P18"><text:span text:style-name="T14">Axios</text:span></text:p>
          <text:p text:style-name="P18"><text:span text:style-name="T14">Service Lay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2" draw:style-name="gr32" draw:text-style-name="P20" draw:layer="layout" svg:width="3.943cm" svg:height="2.638cm" svg:x="14.722cm" svg:y="9.583cm">
          <text:p text:style-name="P18"><text:span text:style-name="T14">JSONPlaceholder</text:span></text:p>
          <text:p text:style-name="P18"><text:span text:style-name="T14">REST AP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ounded Rectangle 13" draw:style-name="gr33" draw:text-style-name="P19" draw:layer="layout" svg:width="3.943cm" svg:height="2.638cm" svg:x="18.916cm" svg:y="9.583cm">
          <text:p text:style-name="P18"><text:span text:style-name="T14">Vercel</text:span></text:p>
          <text:p text:style-name="P18"><text:span text:style-name="T14">(Deployment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ight Arrow 14" draw:style-name="gr34" draw:text-style-name="P21" draw:layer="layout" svg:width="0.249cm" svg:height="0.499cm" svg:x="6.083cm" svg:y="10.653cm">
          <text:p text:style-name="P18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ight Arrow 15" draw:style-name="gr34" draw:text-style-name="P21" draw:layer="layout" svg:width="0.249cm" svg:height="0.499cm" svg:x="10.277cm" svg:y="10.653cm">
          <text:p text:style-name="P18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ight Arrow 16" draw:style-name="gr34" draw:text-style-name="P21" draw:layer="layout" svg:width="0.249cm" svg:height="0.499cm" svg:x="14.472cm" svg:y="10.653cm">
          <text:p text:style-name="P18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ight Arrow 17" draw:style-name="gr34" draw:text-style-name="P21" draw:layer="layout" svg:width="0.249cm" svg:height="0.499cm" svg:x="18.666cm" svg:y="10.653cm">
          <text:p text:style-name="P18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presentation:notes draw:style-name="dp2">
          <draw:page-thumbnail draw:style-name="gr14" draw:layer="layout" svg:width="17.402cm" svg:height="11.136cm" svg:x="1.798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body">
        <draw:custom-shape draw:name="TextBox 4" draw:style-name="gr35" draw:text-style-name="P23" draw:layer="layout" svg:width="10.601cm" svg:height="3.212cm" svg:x="7.198cm" svg:y="5.838cm">
          <text:p text:style-name="P22"><text:span text:style-name="T16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14" draw:layer="layout" svg:width="13.396cm" svg:height="8.572cm" svg:x="2.827cm" svg:y="3.175cm" draw:page-number="9" presentation:class="page"/>
          <draw:frame draw:name="PlaceHolder 2" presentation:style-name="pr3" draw:text-style-name="P25" draw:layer="layout" svg:width="15.238cm" svg:height="9.999cm" svg:x="1.905cm" svg:y="12.224cm" presentation:class="notes" presentation:user-transformed="true">
            <draw:text-box>
              <text:p text:style-name="P24"><text:span text:style-name="T17">thank you very much for joining this PPT, keep learning.</text:span></text:p>
            </draw:text-box>
          </draw:frame>
          <draw:custom-shape draw:name="TextShape 3" draw:style-name="gr36" draw:text-style-name="P27" draw:layer="layout" svg:width="8.253cm" svg:height="1.272cm" svg:x="10.791cm" svg:y="24.126cm">
            <text:p text:style-name="P26"><text:span text:style-name="T1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Aileron" svg:font-family="Aileron"/>
    <style:font-face style:name="Aileron Bold" svg:font-family="'Aileron Bold'"/>
    <style:font-face style:name="Aileron Ultra-Bold" svg:font-family="'Aileron Ultra-Bold'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42882" draw:end-color="#2a83d0" draw:start-intensity="100%" draw:end-intensity="100%" draw:angle="90deg" draw:border="0%">
      <loext:gradient-stop svg:offset="0" loext:color-type="rgb" loext:color-value="#042882"/>
      <loext:gradient-stop svg:offset="1" loext:color-type="rgb" loext:color-value="#2a83d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 style:writing-mode="lr-tb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outline2" style:display-name="Title and body-outline2" style:family="presentation" style:parent-style-name="Title_20_and_20_bod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3" style:display-name="Title and body-outline3" style:family="presentation" style:parent-style-name="Title_20_and_20_bod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4" style:display-name="Title and body-outline4" style:family="presentation" style:parent-style-name="Title_20_and_20_bod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 style:writing-mode="lr-tb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6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.6000003814697pt" style:font-style-asian="normal" style:font-weight-asian="normal" style:font-name-complex="Lucida Sans" style:font-family-complex="'Lucida Sans'" style:font-family-generic-complex="system" style:font-pitch-complex="variable" style:font-size-complex="20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6999998092651pt" fo:letter-spacing="normal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3000001907349pt" fo:letter-spacing="normal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999cm" fo:page-height="15.99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11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.125cm" fo:padding-bottom="0.125cm" fo:padding-left="0.75cm" fo:padding-right="0.25cm" fo:wrap-option="wrap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71cm" fo:padding-bottom="0.071cm" fo:padding-left="0.071cm" fo:padding-right="0.071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9.278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67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9.27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le_20_and_20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71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278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.875cm" style:writing-mode="lr-tb">
        <style:tab-stops/>
      </style:paragraph-properties>
      <style:text-properties fo:font-size="44.299999237060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.299999237060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.80000019073486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32.5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.5pt"/>
    </style:style>
    <style:style style:name="MP13" style:family="paragraph">
      <style:paragraph-properties fo:margin-left="0cm" fo:margin-right="0cm" fo:margin-top="0.26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20.6000003814697pt" fo:hyphenate="false"/>
    </style:style>
    <style:style style:name="MP14" style:family="paragraph">
      <style:paragraph-properties fo:margin-left="0cm" fo:margin-right="0cm" fo:margin-top="0.13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20.6000003814697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.6000003814697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.80000019073486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9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MP20" style:family="paragraph">
      <style:paragraph-properties fo:margin-left="0cm" fo:margin-right="0cm" fo:margin-top="0cm" fo:margin-bottom="0cm" fo:line-height="0.469cm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MP22" style:family="paragraph">
      <style:paragraph-properties fo:margin-left="0cm" fo:margin-right="0cm" fo:margin-top="0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44.2999992370606pt" fo:hyphenate="false"/>
    </style:style>
    <style:style style:name="MP23" style:family="paragraph">
      <style:paragraph-properties fo:margin-left="0cm" fo:margin-right="0cm" fo:margin-top="0.26cm" fo:margin-bottom="0cm" fo:line-height="90%" fo:text-align="start" fo:text-indent="0cm" style:punctuation-wrap="hanging" loext:tab-stop-distance="1.875cm" style:writing-mode="lr-tb">
        <style:tab-stops>
          <style:tab-stop style:position="0cm"/>
        </style:tab-stops>
      </style:paragraph-properties>
      <style:text-properties fo:font-size="17.7000007629395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7.7000007629395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23.6000003814697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3.6000003814697pt"/>
    </style:style>
    <style:style style:name="MP27" style:family="paragraph">
      <style:paragraph-properties fo:margin-left="0cm" fo:margin-right="0cm" fo:margin-top="0.26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23.6000003814697pt" fo:hyphenate="false"/>
    </style:style>
    <style:style style:name="MP28" style:family="paragraph">
      <style:paragraph-properties fo:margin-left="0cm" fo:margin-right="0cm" fo:margin-top="0.13cm" fo:margin-bottom="0cm" fo:line-height="90%" fo:text-align="start" fo:text-indent="0cm" style:punctuation-wrap="hanging" loext:tab-stop-distance="1.875cm" style:writing-mode="lr-tb">
        <style:tab-stops/>
      </style:paragraph-properties>
      <style:text-properties fo:font-size="23.6000003814697pt" fo:hyphenate="false"/>
    </style:style>
    <style:style style:name="MP29" style:family="paragraph">
      <style:paragraph-properties fo:margin-left="0cm" fo:margin-right="0cm" fo:margin-top="0.26cm" fo:margin-bottom="0cm" fo:line-height="90%" fo:text-align="start" fo:text-indent="0cm" style:punctuation-wrap="hanging" loext:tab-stop-distance="1.875cm" style:writing-mode="lr-tb">
        <style:tab-stops>
          <style:tab-stop style:position="0cm"/>
        </style:tab-stops>
      </style:paragraph-properties>
      <style:text-properties fo:font-size="11.8000001907349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1.8000001907349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3.6000003814697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.2999992370606pt" fo:letter-spacing="normal" fo:language="en" fo:country="US" fo:font-style="normal" style:text-underline-style="none" fo:font-weight="normal" fo:background-color="transparent" style:font-size-asian="44.2999992370606pt" style:font-style-asian="normal" style:font-weight-asian="normal" style:font-size-complex="44.2999992370606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normal" fo:background-color="transparent" style:font-size-asian="8.80000019073486pt" style:font-style-asian="normal" style:font-weight-asian="normal" style:font-size-complex="8.80000019073486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.5pt" fo:letter-spacing="normal" fo:language="en" fo:country="US" fo:font-style="normal" style:text-underline-style="none" fo:font-weight="normal" fo:background-color="transparent" style:font-size-asian="32.5pt" style:font-style-asian="normal" style:font-weight-asian="normal" style:font-size-complex="32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.6000003814697pt" fo:letter-spacing="normal" fo:language="en" fo:country="US" fo:font-style="normal" style:text-underline-style="none" fo:font-weight="normal" fo:background-color="transparent" style:font-size-asian="20.6000003814697pt" style:font-style-asian="normal" style:font-weight-asian="normal" style:font-size-complex="20.6000003814697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7.7000007629395pt" fo:letter-spacing="normal" fo:language="en" fo:country="US" fo:font-style="normal" style:text-underline-style="none" fo:font-weight="normal" fo:background-color="transparent" style:font-size-asian="17.7000007629395pt" style:font-style-asian="normal" style:font-weight-asian="normal" style:font-size-complex="17.7000007629395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.6999998092651pt" fo:letter-spacing="normal" fo:language="en" fo:country="US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3000001907349pt" fo:letter-spacing="normal" fo:language="en" fo:country="US" fo:font-style="normal" style:text-underline-style="none" fo:font-weight="normal" fo:background-color="transparent" style:font-size-asian="13.3000001907349pt" style:font-style-asian="normal" style:font-weight-asian="normal" style:font-size-complex="13.3000001907349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9398a1" loext:opacity="100%" style:text-outline="false" style:text-line-through-style="none" style:text-line-through-type="none" style:text-position="0% 100%" style:font-name="Arial" fo:font-size="9.80000019073486pt" fo:letter-spacing="normal" fo:language="en" fo:country="none" fo:font-style="normal" style:text-underline-style="none" fo:font-weight="normal" fo:background-color="transparent" style:font-name-asian="Arial" style:font-size-asian="9.80000019073486pt" style:font-style-asian="normal" style:font-weight-asian="normal" style:font-name-complex="Arial" style:font-size-complex="9.80000019073486pt" style:font-style-complex="normal" style:font-weight-complex="normal">
        <loext:char-complex-color loext:theme-type="dark2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en" fo:country="IN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7.7000007629395pt" fo:letter-spacing="normal" fo:language="en" fo:country="US" fo:font-style="normal" style:text-underline-style="none" fo:font-weight="normal" fo:background-color="transparent" style:font-size-asian="17.7000007629395pt" style:font-style-asian="normal" style:font-weight-asian="normal" style:font-size-complex="17.700000762939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7.7000007629395pt" fo:letter-spacing="normal" fo:language="en" fo:country="US" fo:font-style="normal" style:text-underline-style="none" fo:font-weight="bold" fo:background-color="transparent" style:font-size-asian="17.7000007629395pt" style:font-style-asian="normal" style:font-weight-asian="bold" style:font-size-complex="17.7000007629395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3.6000003814697pt" fo:letter-spacing="normal" fo:language="en" fo:country="US" fo:font-style="normal" style:text-underline-style="none" fo:font-weight="normal" fo:background-color="transparent" style:font-size-asian="23.6000003814697pt" style:font-style-asian="normal" style:font-weight-asian="normal" style:font-size-complex="23.6000003814697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3.6000003814697pt" fo:letter-spacing="normal" fo:language="en" fo:country="US" fo:font-style="normal" style:text-underline-style="none" fo:font-weight="normal" fo:background-color="transparent" style:font-size-asian="23.6000003814697pt" style:font-style-asian="normal" style:font-weight-asian="normal" style:font-size-complex="23.6000003814697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.8000001907349pt" fo:letter-spacing="normal" fo:language="en" fo:country="US" fo:font-style="normal" style:text-underline-style="none" fo:font-weight="normal" fo:background-color="transparent" style:font-size-asian="11.8000001907349pt" style:font-style-asian="normal" style:font-weight-asian="normal" style:font-size-complex="11.8000001907349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69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69cm"/>
        <style:text-properties style:font-name="Arial1" fo:color="#000000" fo:font-size="100%"/>
      </text:list-level-style-bullet>
      <text:list-level-style-bullet text:level="2" text:bullet-char="•">
        <style:list-level-properties text:space-before="0.937cm" text:min-label-width="0.469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69cm"/>
        <style:text-properties style:font-name="Arial1" fo:color="#000000" fo:font-size="100%"/>
      </text:list-level-style-bullet>
      <text:list-level-style-bullet text:level="2" text:bullet-char="•">
        <style:list-level-properties text:space-before="0.937cm" text:min-label-width="0.469cm"/>
        <style:text-properties style:font-name="Arial1" fo:color="#000000" fo:font-size="100%"/>
      </text:list-level-style-bullet>
      <text:list-level-style-bullet text:level="3" text:bullet-char="•">
        <style:list-level-properties text:space-before="1.875cm" text:min-label-width="0.469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69cm"/>
        <style:text-properties style:font-name="Arial1" fo:color="#000000" fo:font-size="100%"/>
      </text:list-level-style-bullet>
      <text:list-level-style-bullet text:level="2" text:bullet-char="•">
        <style:list-level-properties text:space-before="0.937cm" text:min-label-width="0.469cm"/>
        <style:text-properties style:font-name="Arial1" fo:color="#000000" fo:font-size="100%"/>
      </text:list-level-style-bullet>
      <text:list-level-style-bullet text:level="3" text:bullet-char="•">
        <style:list-level-properties text:space-before="1.875cm" text:min-label-width="0.469cm"/>
        <style:text-properties style:font-name="Arial1" fo:color="#000000" fo:font-size="100%"/>
      </text:list-level-style-bullet>
      <text:list-level-style-bullet text:level="4" text:bullet-char="•">
        <style:list-level-properties text:space-before="2.812cm" text:min-label-width="0.469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69cm"/>
        <style:text-properties style:font-name="Arial1" fo:color="#000000" fo:font-size="100%"/>
      </text:list-level-style-bullet>
      <text:list-level-style-bullet text:level="2" text:bullet-char="•">
        <style:list-level-properties text:space-before="0.937cm" text:min-label-width="0.469cm"/>
        <style:text-properties style:font-name="Arial1" fo:color="#000000" fo:font-size="100%"/>
      </text:list-level-style-bullet>
      <text:list-level-style-bullet text:level="3" text:bullet-char="•">
        <style:list-level-properties text:space-before="1.875cm" text:min-label-width="0.469cm"/>
        <style:text-properties style:font-name="Arial1" fo:color="#000000" fo:font-size="100%"/>
      </text:list-level-style-bullet>
      <text:list-level-style-bullet text:level="4" text:bullet-char="•">
        <style:list-level-properties text:space-before="2.812cm" text:min-label-width="0.469cm"/>
        <style:text-properties style:font-name="Arial1" fo:color="#000000" fo:font-size="100%"/>
      </text:list-level-style-bullet>
      <text:list-level-style-bullet text:level="5" text:bullet-char="•">
        <style:list-level-properties text:space-before="3.75cm" text:min-label-width="0.469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8.748cm" svg:height="5.569cm" svg:x="3.125cm" svg:y="2.6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498cm" svg:height="9.277cm" svg:x="1.249cm" svg:y="3.7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1.56cm" svg:height="3.091cm" svg:x="1.719cm" svg:y="0.85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1.56cm" svg:height="10.15cm" svg:x="1.719cm" svg:y="4.2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5.389cm" svg:height="13.557cm" svg:x="17.89cm" svg:y="0.85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15.858cm" svg:height="13.557cm" svg:x="1.719cm" svg:y="0.852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26" presentation:style-name="Mpr15" draw:text-style-name="MP17" draw:layer="backgroundobjects" svg:width="1.499cm" svg:height="1.223cm" svg:x="23.163cm" svg:y="14.505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0cm" svg:height="0cm" svg:x="0cm" svg:y="2.257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2" presentation:style-name="Mpr18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18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18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g draw:name="Group 28" draw:style-name="Mgr3">
        <draw:custom-shape draw:name="Freeform 29" draw:style-name="Mgr4" draw:text-style-name="MP19" draw:layer="layout" svg:width="24.998cm" svg:height="1.518cm" svg:x="0cm" svg:y="0.36cm">
          <text:p text:style-name="MP18"><text:span text:style-name="MT9">PROBLEM STATEMENT</text:span></text:p>
          <text:p text:style-name="MP18"><text:span text:style-name="M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Mgr5" draw:text-style-name="MP21" draw:layer="layout" svg:width="24.342cm" svg:height="1.661cm" svg:x="0cm" svg:y="0.217cm">
          <text:p text:style-name="MP20"><text:span text:style-name="M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Custom_20_Layout-title" draw:layer="backgroundobjects" svg:width="0cm" svg:height="0cm" svg:x="0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1" draw:text-style-name="MP12" draw:layer="backgroundobjects" svg:width="21.56cm" svg:height="3.091cm" svg:x="1.719cm" svg:y="0.85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2" draw:text-style-name="MP15" draw:layer="backgroundobjects" svg:width="21.56cm" svg:height="10.15cm" svg:x="1.719cm" svg:y="4.2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3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3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6" draw:text-style-name="MP6" draw:layer="backgroundobjects" svg:width="21.56cm" svg:height="6.654cm" svg:x="1.706cm" svg:y="3.989cm" presentation:class="title" presentation:user-transformed="true">
        <draw:text-box>
          <text:p text:style-name="MP22"><text:span text:style-name="MT1">Click to edit Master title style</text:span></text:p>
        </draw:text-box>
      </draw:frame>
      <draw:frame draw:name="Text Placeholder 2" presentation:style-name="Mpr27" draw:text-style-name="MP24" draw:layer="backgroundobjects" svg:width="21.56cm" svg:height="3.499cm" svg:x="1.706cm" svg:y="10.706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3" presentation:style-name="Mpr28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8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8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1" draw:text-style-name="MP12" draw:layer="backgroundobjects" svg:width="21.56cm" svg:height="3.091cm" svg:x="1.719cm" svg:y="0.85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32" draw:text-style-name="MP15" draw:layer="backgroundobjects" svg:width="10.623cm" svg:height="10.15cm" svg:x="1.719cm" svg:y="4.2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2" draw:text-style-name="MP15" draw:layer="backgroundobjects" svg:width="10.623cm" svg:height="10.15cm" svg:x="12.656cm" svg:y="4.2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3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33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33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1.56cm" svg:height="3.091cm" svg:x="1.722cm" svg:y="0.85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7" draw:text-style-name="MP24" draw:layer="backgroundobjects" svg:width="10.575cm" svg:height="1.921cm" svg:x="1.722cm" svg:y="3.922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Content Placeholder 3" presentation:style-name="Mpr38" draw:text-style-name="MP15" draw:layer="backgroundobjects" svg:width="10.575cm" svg:height="8.594cm" svg:x="1.722cm" svg:y="5.84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24" draw:layer="backgroundobjects" svg:width="10.627cm" svg:height="1.921cm" svg:x="12.656cm" svg:y="3.922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Content Placeholder 5" presentation:style-name="Mpr38" draw:text-style-name="MP15" draw:layer="backgroundobjects" svg:width="10.627cm" svg:height="8.594cm" svg:x="12.656cm" svg:y="5.84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9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9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2" draw:text-style-name="MP12" draw:layer="backgroundobjects" svg:width="21.56cm" svg:height="3.091cm" svg:x="1.719cm" svg:y="0.85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43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43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43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6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6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6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9" draw:text-style-name="MP26" draw:layer="backgroundobjects" svg:width="8.062cm" svg:height="3.732cm" svg:x="1.722cm" svg:y="1.067cm" presentation:class="title" presentation:user-transformed="true">
        <draw:text-box>
          <text:p text:style-name="MP25"><text:span text:style-name="MT14">Click to edit Master title style</text:span></text:p>
        </draw:text-box>
      </draw:frame>
      <draw:frame draw:name="Content Placeholder 2" presentation:style-name="Mpr50" draw:text-style-name="MP26" draw:layer="backgroundobjects" svg:width="12.655cm" svg:height="11.368cm" svg:x="10.628cm" svg:y="2.303cm" presentation:class="outline" presentation:user-transformed="true">
        <draw:text-box>
          <text:list text:style-name="ML5">
            <text:list-item>
              <text:p text:style-name="MP27"><text:span text:style-name="MT1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0" draw:text-style-name="MP30" draw:layer="backgroundobjects" svg:width="8.062cm" svg:height="8.891cm" svg:x="1.722cm" svg:y="4.8cm" presentation:class="outline" presentation:user-transformed="true">
        <draw:text-box>
          <text:p text:style-name="MP29"><text:span text:style-name="MT16">Click to edit Master text styles</text:span></text:p>
        </draw:text-box>
      </draw:frame>
      <draw:frame draw:name="Date Placeholder 4" presentation:style-name="Mpr51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1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1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4" draw:text-style-name="MP26" draw:layer="backgroundobjects" svg:width="8.062cm" svg:height="3.732cm" svg:x="1.722cm" svg:y="1.067cm" presentation:class="title" presentation:user-transformed="true">
        <draw:text-box>
          <text:p text:style-name="MP25"><text:span text:style-name="MT14">Click to edit Master title style</text:span></text:p>
        </draw:text-box>
      </draw:frame>
      <draw:frame draw:name="Picture Placeholder 2" presentation:style-name="Mpr55" draw:text-style-name="MP26" draw:layer="backgroundobjects" svg:width="12.655cm" svg:height="11.368cm" svg:x="10.628cm" svg:y="2.303cm" presentation:class="outline" presentation:user-transformed="true">
        <draw:text-box>
          <text:p text:style-name="MP31"><text:span text:style-name="MT15">Click icon to add picture</text:span></text:p>
        </draw:text-box>
      </draw:frame>
      <draw:frame draw:name="Text Placeholder 3" presentation:style-name="Mpr56" draw:text-style-name="MP30" draw:layer="backgroundobjects" svg:width="8.062cm" svg:height="8.891cm" svg:x="1.722cm" svg:y="4.8cm" presentation:class="outline" presentation:user-transformed="true">
        <draw:text-box>
          <text:p text:style-name="MP29"><text:span text:style-name="MT16">Click to edit Master text styles</text:span></text:p>
        </draw:text-box>
      </draw:frame>
      <draw:frame draw:name="Date Placeholder 4" presentation:style-name="Mpr57" draw:text-style-name="MP8" draw:layer="backgroundobjects" svg:width="5.624cm" svg:height="0.851cm" svg:x="1.719cm" svg:y="14.82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7" draw:text-style-name="MP8" draw:layer="backgroundobjects" svg:width="8.436cm" svg:height="0.851cm" svg:x="8.281cm" svg:y="14.828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7" draw:text-style-name="MP8" draw:layer="backgroundobjects" svg:width="5.624cm" svg:height="0.851cm" svg:x="17.655cm" svg:y="14.82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Ankit Dixit</meta:initial-creator>
    <meta:editing-cycles>6</meta:editing-cycles>
    <meta:creation-date>2026-07-09T06:40:22</meta:creation-date>
    <dc:date>2026-07-11T12:23:51.408897300</dc:date>
    <meta:editing-duration>PT25M16S</meta:editing-duration>
    <meta:generator>LibreOffice/25.2.7.1$Windows_X86_64 LibreOffice_project/16e8e36d1610f10597ed778c3dcb0a5aa0ed5d6f</meta:generator>
    <meta:document-statistic meta:object-count="232"/>
    <meta:user-defined meta:name="AppVersion">16.0000</meta:user-defined>
    <meta:user-defined meta:name="Notes" meta:value-type="float">1</meta:user-defined>
    <meta:user-defined meta:name="PresentationFormat">Custom</meta:user-defined>
    <meta:user-defined meta:name="Slides" meta:value-type="float">9</meta:user-defined>
    <meta:template xlink:type="simple" xlink:actuate="onRequest" xlink:title="Office 2013 - 2022 Theme" xlink:href=""/>
  </office:meta>
</office:document-meta>
</file>